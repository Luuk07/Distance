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5e635" officeooo:paragraph-rsid="0005e635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5e635" officeooo:paragraph-rsid="0005e635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63b1b" officeooo:paragraph-rsid="00063b1b" style:font-weight-asian="normal" style:font-weight-complex="normal"/>
    </style:style>
    <style:style style:name="T1" style:family="text">
      <style:text-properties officeooo:rsid="00063b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bindungen Arduino Getränkespenderprojekt</text:p>
      <text:p text:style-name="P1"/>
      <text:p text:style-name="P1">LCD </text:p>
      <text:p text:style-name="P2">K→ GND(-)</text:p>
      <text:p text:style-name="P2">A→ 5V</text:p>
      <text:p text:style-name="P2">D7→ D7</text:p>
      <text:p text:style-name="P2">D6 → D6</text:p>
      <text:p text:style-name="P2">D5 → D5</text:p>
      <text:p text:style-name="P2">D4 → D4</text:p>
      <text:p text:style-name="P2">E → D3</text:p>
      <text:p text:style-name="P2">Rw → GND(-)</text:p>
      <text:p text:style-name="P2">Rs → D2</text:p>
      <text:p text:style-name="P2">VO → GND(-)</text:p>
      <text:p text:style-name="P2">VDD → +</text:p>
      <text:p text:style-name="P2">VSS → GND(-)</text:p>
      <text:p text:style-name="P2"/>
      <text:p text:style-name="P1">Distance-Sensor</text:p>
      <text:p text:style-name="P2">GND → GND(-)</text:p>
      <text:p text:style-name="P2">Echo → D8</text:p>
      <text:p text:style-name="P2">Trig → D9</text:p>
      <text:p text:style-name="P2">Vcc → +</text:p>
      <text:p text:style-name="P2"/>
      <text:p text:style-name="P1">Wasser-Pumpe</text:p>
      <text:p text:style-name="P2">- → GND(-)</text:p>
      <text:p text:style-name="P2">+ → + und D13</text:p>
      <text:p text:style-name="P2"/>
      <text:p text:style-name="P1"><text:span text:style-name="T1">Arduino to </text:span>Breadboard</text:p>
      <text:p text:style-name="P3">Vin → +</text:p>
      <text:p text:style-name="P3">GND → 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7T18:30:01.359868300</meta:creation-date>
    <dc:date>2026-06-17T18:43:50.271681100</dc:date>
    <meta:editing-duration>PT1M14S</meta:editing-duration>
    <meta:editing-cycles>1</meta:editing-cycles>
    <meta:document-statistic meta:table-count="0" meta:image-count="0" meta:object-count="0" meta:page-count="1" meta:paragraph-count="25" meta:word-count="68" meta:character-count="264" meta:non-whitespace-character-count="220"/>
    <meta:generator>LibreOffice/25.8.6.2$Windows_X86_64 LibreOffice_project/b4b39682cd9868fa725bc664aff94278d315bd04</meta:generator>
  </office:meta>
</office:document-meta>
</file>